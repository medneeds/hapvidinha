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45330000027FF0000191DFEA0A5C2.emf" manifest:media-type="image/x-emf"/>
  <manifest:file-entry manifest:full-path="Pictures/1000000100000183000000F3407EF23B.png" manifest:media-type="image/png"/>
  <manifest:file-entry manifest:full-path="Pictures/100000000000025D000001ABE1E49F2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ahoma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ahoma" fo:font-weight="bold" officeooo:rsid="00023c15" officeooo:paragraph-rsid="00023c15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ahoma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style:font-name="Tahoma" fo:font-weight="bold" style:font-weight-asian="bold" style:font-weight-complex="bold"/>
    </style:style>
    <style:style style:name="T2" style:family="text">
      <style:text-properties fo:font-variant="normal" fo:text-transform="none" fo:color="#c9211e" loext:opacity="100%" fo:font-family="Open-Sans, sans-serif" style:font-family-generic="roman" style:font-pitch="variable" fo:font-size="9pt" fo:letter-spacing="normal" fo:font-style="normal" fo:font-weight="normal" style:font-size-asian="9pt" style:font-style-asian="normal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graphics1" text:anchor-type="char" svg:x="16.432cm" svg:y="0.06cm" svg:width="2.903cm" svg:height="1.718cm" draw:z-index="0"><draw:image xlink:href="Pictures/10045330000027FF0000191DFEA0A5C2.emf" xlink:type="simple" xlink:show="embed" xlink:actuate="onLoad" draw:mime-type="image/x-emf"/><draw:image xlink:href="Pictures/1000000100000183000000F3407EF23B.png" xlink:type="simple" xlink:show="embed" xlink:actuate="onLoad" draw:mime-type="image/png"/></draw:frame><draw:frame draw:style-name="fr1" draw:name="graphics2" text:anchor-type="char" svg:x="0.131cm" svg:y="0.266cm" svg:width="3.201cm" svg:height="1.815cm" draw:z-index="1"><draw:image xlink:href="Pictures/100000000000025D000001ABE1E49F2B.jpg" xlink:type="simple" xlink:show="embed" xlink:actuate="onLoad" draw:mime-type="image/jpeg"/></draw:frame></text:p>
      <text:p text:style-name="P2">NOME DO PACIENTE:</text:p>
      <text:p text:style-name="P3"/>
      <text:p text:style-name="P4"><text:span text:style-name="T1">PROTOCOLOS DE USG: </text:span><text:span text:style-name="T2"><text:s/></text:span></text:p>
      <text:p text:style-name="P3" loext:marker-style-name="T1"/>
      <text:p text:style-name="P4" loext:marker-style-name="T1"><text:span text:style-name="T1">USTV</text:span><text:span text:style-name="T1"/></text:p>
      <text:p text:style-name="P4" loext:marker-style-name="T1"><text:span text:style-name="T1">( ) Sangramento vaginal com gestacao comprovada, bhcg + ou pre-natal em curso, solicitar ate no maximo 16 semanas.<text:line-break/>( ) Suspeita de gravidez ectopica(bhcg +).</text:span><text:span text:style-name="T1"/></text:p>
      <text:p text:style-name="P4" loext:marker-style-name="T1"><text:span text:style-name="T1">( ) Suspeita de DIP<text:line-break/><text:line-break/>Obstetrico <text:line-break/>( ) Sem restricoes.<text:line-break/><text:line-break/>Abdome total <text:line-break/>( ) Abdome agudo com hemograma infeccioso(anexar exame a solicitacao).<text:line-break/>( <text:s/>) Pancreatite com alteracoes laboratoriais(anexar exame a solicitacao).<text:line-break/>( <text:s/>) Trauma abdominal .<text:line-break/>( <text:s/>) Calculose renal com sinais obstrutivos.<text:line-break/>( <text:s text:c="3"/>) Dor abdominal A/E .<text:line-break/>Abdome superior <text:line-break/>Sugere-se sempre solicitar total, obedecendo criterios anteriores<text:line-break/><text:line-break/>Vias urinarias</text:span><text:span text:style-name="T1"/></text:p>
      <text:p text:style-name="P4"><text:span text:style-name="T1">( ) Sugere-se sempre solicitar total, obedecendo criterios anteriores<text:line-break/><text:line-break/>Mamas<text:line-break/>( <text:s/>) Abscessos mamarios, anexar exame laboratorial(leucocitose com desvio a esquerda).<text:line-break/><text:line-break/>Partes Moles<text:line-break/>( <text:s/>) Abscessos, anexar exame laboratorial(leucocitose com desvio a esquerda).<text:line-break/><text:line-break/>Doppler Membros<text:line-break/>( <text:s/></text:span><text:span text:style-name="T3">) Pesquisa de TVP, pós tto.<text:line-break/>( <text:s text:c="2"/>) Tromboflebite obliterante.<text:line-break/><text:line-break/>Articulacoes <text:line-break/>( <text:s text:c="2"/>) Somente em caso de Artrite septica com hemograma em anexo com desvio a esquerda.<text:line-break/><text:line-break/>Testiculos<text:line-break/>( <text:s text:c="3"/>) Torcao testicular, com historia clinica detalhada.  Dor testicular inespecifica nao se enquadra.<text:line-break/><text:line-break/>Cervical<text:line-break/></text:span><text:span text:style-name="T1">Nao ha indicacao na urgencia, excepcionalmente nos casos que se enquadram os exames de partes moles.<text:line-break/>(LINFONODOMEGALIAS NAO SE ENQUADRAM EM CASOS DE URGENCIA).<text:line-break/><text:line-break/>Este protocolo nao tenta ditar condutas, no entanto, se o plantonista achar necessario o exame, o mesmo devera entrar em contato por ligacao telefonica com plantonista da ultrassonografia, discutir o caso do paciente. <text:line-break/>Exames solicitados apos as 00:00, obrigatoriamente o plantonista devera ligar para o medico ultrassonografist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1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Título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Título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Segoe UI" style:font-family-asian="'Segoe UI'" style:font-family-generic-asian="system" style:font-pitch-asian="variable" style:font-size-asian="7pt" style:font-weight-asian="bold" style:font-name-complex="Tahoma1" style:font-family-complex="Tahoma" style:font-family-generic-complex="system" style:font-pitch-complex="variable" style:font-size-complex="7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itações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Título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ítulo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0.57cm" fo:margin-left="0.857cm" fo:margin-right="0.739cm" style:writing-mode="lr-tb" style:layout-grid-color="#c0c0c0" style:layout-grid-lines="2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18:29:13.455243600</meta:creation-date>
    <dc:language>pt-BR</dc:language>
    <meta:print-date>2025-12-29T11:21:47</meta:print-date>
    <dc:date>2026-05-20T18:29:39.233636200</dc:date>
    <meta:editing-cycles>56</meta:editing-cycles>
    <meta:editing-duration>P14DT4H16M26S</meta:editing-duration>
    <meta:generator>LibreOffice/25.2.5.2$Windows_X86_64 LibreOffice_project/03d19516eb2e1dd5d4ccd751a0d6f35f35e08022</meta:generator>
    <meta:document-statistic meta:table-count="0" meta:image-count="2" meta:object-count="0" meta:page-count="1" meta:paragraph-count="6" meta:word-count="243" meta:character-count="1662" meta:non-whitespace-character-count="1391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