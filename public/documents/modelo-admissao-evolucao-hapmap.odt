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Calibri" fo:font-size="10pt" fo:font-weight="bold" officeooo:rsid="001b55f1" officeooo:paragraph-rsid="001b55f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Calibri" fo:font-size="10pt" officeooo:rsid="001b55f1" officeooo:paragraph-rsid="001b55f1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Calibri" fo:font-size="10pt" officeooo:rsid="0022b06b" officeooo:paragraph-rsid="0022b06b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Calibri" fo:font-size="10pt" officeooo:rsid="001b55f1" officeooo:paragraph-rsid="001688bb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00de2b1" officeooo:paragraph-rsid="001688b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alibri" fo:font-size="10pt" officeooo:paragraph-rsid="001688bb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003934c" officeooo:paragraph-rsid="001bf9a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00de2b1" officeooo:paragraph-rsid="001bf9a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weight="normal" officeooo:rsid="003b42ac" officeooo:paragraph-rsid="001688b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weight="normal" officeooo:rsid="00206a01" officeooo:paragraph-rsid="00206a0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a4485e4" officeooo:paragraph-rsid="001b55f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a4485e4" officeooo:paragraph-rsid="001bf9a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weight="normal" officeooo:rsid="001688bb" officeooo:paragraph-rsid="001688b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weight="normal" officeooo:paragraph-rsid="001688bb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paragraph-rsid="001688b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01688bb" officeooo:paragraph-rsid="001688bb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00de2b1" officeooo:paragraph-rsid="001b55f1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018dbe7" officeooo:paragraph-rsid="001688b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01b55f1" officeooo:paragraph-rsid="001b55f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weight="normal" officeooo:rsid="00155ee3" officeooo:paragraph-rsid="0017480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weight="normal" officeooo:rsid="001a841b" officeooo:paragraph-rsid="001a841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weight="normal" officeooo:rsid="001b55f1" officeooo:paragraph-rsid="001b55f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weight="normal" officeooo:rsid="005ad360" officeooo:paragraph-rsid="001688b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pt" fo:country="BR" fo:font-weight="normal" officeooo:rsid="0003934c" officeooo:paragraph-rsid="001b55f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weight="normal" officeooo:paragraph-rsid="001b55f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Calibri" fo:font-size="10pt" officeooo:paragraph-rsid="00206a01" style:font-size-asian="10pt" style:font-size-complex="10pt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officeooo:rsid="00399df2"/>
    </style:style>
    <style:style style:name="T3" style:family="text">
      <style:text-properties fo:language="pt" fo:country="BR" officeooo:rsid="005cb306"/>
    </style:style>
    <style:style style:name="T4" style:family="text">
      <style:text-properties fo:language="pt" fo:country="BR" officeooo:rsid="00656432"/>
    </style:style>
    <style:style style:name="T5" style:family="text">
      <style:text-properties fo:language="pt" fo:country="BR" officeooo:rsid="001688bb"/>
    </style:style>
    <style:style style:name="T6" style:family="text">
      <style:text-properties officeooo:rsid="00416768"/>
    </style:style>
    <style:style style:name="T7" style:family="text">
      <style:text-properties officeooo:rsid="000de2b1"/>
    </style:style>
    <style:style style:name="T8" style:family="text">
      <style:text-properties officeooo:rsid="0020fbfe"/>
    </style:style>
    <style:style style:name="T9" style:family="text">
      <style:text-properties officeooo:rsid="001688bb"/>
    </style:style>
    <style:style style:name="T10" style:family="text">
      <style:text-properties officeooo:rsid="001bf9a5"/>
    </style:style>
    <style:style style:name="T11" style:family="text">
      <style:text-properties officeooo:rsid="001b55f1"/>
    </style:style>
    <style:style style:name="T12" style:family="text">
      <style:text-properties fo:language="pt" fo:country="BR" officeooo:rsid="035b1bca"/>
    </style:style>
    <style:style style:name="T13" style:family="text">
      <style:text-properties fo:language="pt" fo:country="BR"/>
    </style:style>
    <style:style style:name="T14" style:family="text">
      <style:text-properties fo:language="pt" fo:country="BR" officeooo:rsid="001d2a93"/>
    </style:style>
    <style:style style:name="T15" style:family="text">
      <style:text-properties fo:language="pt" fo:country="BR" officeooo:rsid="001b55f1"/>
    </style:style>
    <style:style style:name="T16" style:family="text">
      <style:text-properties officeooo:rsid="001d2a93"/>
    </style:style>
    <style:style style:name="T17" style:family="text">
      <style:text-properties officeooo:rsid="00174806"/>
    </style:style>
    <style:style style:name="T18" style:family="text">
      <style:text-properties officeooo:rsid="0022b06b"/>
    </style:style>
    <style:style style:name="T19" style:family="text">
      <style:text-properties officeooo:rsid="00206a01"/>
    </style:style>
    <style:style style:name="T20" style:family="text">
      <style:text-properties officeooo:rsid="0003934c"/>
    </style:style>
    <style:style style:name="T21" style:family="text">
      <style:text-properties fo:language="pt" fo:country="BR" officeooo:rsid="000de2b1"/>
    </style:style>
    <style:style style:name="T22" style:family="text">
      <style:text-properties fo:language="pt" fo:country="BR" officeooo:rsid="00541373"/>
    </style:style>
    <style:style style:name="T23" style:family="text">
      <style:text-properties fo:language="pt" fo:country="BR" officeooo:rsid="0003934c"/>
    </style:style>
    <style:style style:name="T24" style:family="text">
      <style:text-properties fo:language="pt" fo:country="BR" fo:font-weight="normal" officeooo:rsid="001b55f1" style:font-weight-asian="normal" style:font-weight-complex="normal"/>
    </style:style>
    <style:style style:name="T25" style:family="text">
      <style:text-properties fo:language="pt" fo:country="BR" fo:font-weight="normal" officeooo:rsid="00206a0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DRONIZAÇÃO DO MODELO DE ADMISSÃO/SOLICITAÇÃO DE INTERNAÇÃO</text:p>
      <text:p text:style-name="P2"/>
      <text:p text:style-name="P3"># MEDICINA DE EMERGÊNCIA</text:p>
      <text:p text:style-name="P4"><text:span text:style-name="T1">- ADMISSÃO: 08/09/2025</text:span></text:p>
      <text:p text:style-name="P5"/>
      <text:p text:style-name="P6"><text:span text:style-name="T2"># </text:span><text:span text:style-name="T3">H</text:span><text:span text:style-name="T4">ISTÓRIA DA </text:span><text:span text:style-name="T3">D</text:span><text:span text:style-name="T4">OENÇA ATUAL </text:span><text:span text:style-name="T5">(HDA)</text:span><text:span text:style-name="T2">: </text:span></text:p>
      <text:p text:style-name="P5"/>
      <text:p text:style-name="P5"># A<text:span text:style-name="T6">NTECEDENTES MÓRBIDOS PESSOAIS (AMP)</text:span>: </text:p>
      <text:p text:style-name="P5"/>
      <text:p text:style-name="P7"><text:span text:style-name="T7"># </text:span>MEDICAMENTOS DE USO <text:span text:style-name="T8">CONTÍNUO (MUC): </text:span></text:p>
      <text:p text:style-name="P8"/>
      <text:p text:style-name="P5"># ALERGIA MEDICAMENTOSA: </text:p>
      <text:p text:style-name="P9"/>
      <text:p text:style-name="P9"># ANTROPOMETRIA: PESO <text:s/>KG / ESTATURA <text:s/>M</text:p>
      <text:p text:style-name="P9"/>
      <text:p text:style-name="P10"># DISPOSITIVOS:</text:p>
      <text:p text:style-name="P9"/>
      <text:p text:style-name="P11"># SSVV <text:span text:style-name="T9">ADMISSIONAIS</text:span>: </text:p>
      <text:p text:style-name="P12"><text:span text:style-name="T10">&gt; </text:span>PA: <text:s/>MMHG <text:span text:style-name="T10">|</text:span> FC: <text:s/>BPM <text:span text:style-name="T10">|</text:span> FR: <text:s/><text:span text:style-name="T11">IRPM </text:span><text:s/><text:span text:style-name="T10">|</text:span> SATO2: % <text:s/><text:span text:style-name="T10">| TAX <text:s/>°C <text:s/>| DX <text:s/>MG/DL</text:span></text:p>
      <text:p text:style-name="P13"/>
      <text:p text:style-name="P14"><text:span text:style-name="T12"># EXAME FÍSICO</text:span><text:span text:style-name="T13">: </text:span></text:p>
      <text:p text:style-name="P14"><text:span text:style-name="T13">- </text:span><text:span text:style-name="T14">ESTADO GERAL</text:span><text:span text:style-name="T15">:</text:span></text:p>
      <text:p text:style-name="P13">- <text:span text:style-name="T16">CARDIOVASCULAR</text:span>: </text:p>
      <text:p text:style-name="P15">- <text:span text:style-name="T16">RESPIRATÓRIO</text:span>: </text:p>
      <text:p text:style-name="P15">- <text:span text:style-name="T16">ABDOMINAL</text:span>: </text:p>
      <text:p text:style-name="P16">- <text:span text:style-name="T16">EXTREMIDADES:</text:span></text:p>
      <text:p text:style-name="P5"/>
      <text:p text:style-name="P17"># <text:span text:style-name="T17">EXAMES LABORATORIAIS:</text:span></text:p>
      <text:p text:style-name="P17"><text:span text:style-name="T11">&gt; LAB (08/09/2025): </text:span><text:s/></text:p>
      <text:p text:style-name="P18"/>
      <text:p text:style-name="P19"># EXAMES DE IMAGEM:</text:p>
      <text:p text:style-name="P19">&gt; TC DE TÓRAX (08/09/2025):</text:p>
      <text:p text:style-name="P20"/>
      <text:p text:style-name="P21"># <text:span text:style-name="T11">PARECERES/AVALIAÇÕES:</text:span></text:p>
      <text:p text:style-name="P22">&gt; PARECER DA TELE CARDIOLOGIA (08/09/2025 – DRA BELTRANA):</text:p>
      <text:p text:style-name="P22"/>
      <text:p text:style-name="P10"># <text:span text:style-name="T18">EVOLUÇÃO/</text:span>IMPRESSÃO CLÍNICA: </text:p>
      <text:p text:style-name="P23"/>
      <text:p text:style-name="P5"># PLANO <text:span text:style-name="T19">DE CUIDADOS</text:span>:</text:p>
      <text:p text:style-name="P19">- MONITORIZAÇÃO MULTIPARAMÉTRICA CONTÍNUA</text:p>
      <text:p text:style-name="P24">- SUPORTE CLINICO E MULTIPROFISSIONAL</text:p>
      <text:p text:style-name="P19">- ADMISSÃO E PRESCRIÇÃO MÉDICAS</text:p>
      <text:p text:style-name="P19">- EXPANSÃO VOLÊMICA SF0,9% 30ML/KG</text:p>
      <text:p text:style-name="P19">- <text:span text:style-name="T17">SOLICITO HEMOCULTURAS E UROCULTURA</text:span></text:p>
      <text:p text:style-name="P19"><text:span text:style-name="T20">- ANTIBIOTICOTERAPIA ENDOVENOSA </text:span>(INICIAR APÓS COLETA DE CULTURAS)</text:p>
      <text:p text:style-name="P19">- SOLICITO TC DE ABDOME TOTAL COM CONTRASTE</text:p>
      <text:p text:style-name="P19">- ACOMPANHAMENTO CONJUNTO A CIRURGIA GERAL</text:p>
      <text:p text:style-name="P25"><text:span text:style-name="T21">- </text:span><text:span text:style-name="T22">SOLICITO </text:span><text:span text:style-name="T23">INTERNAÇÃO HOSPITALAR</text:span></text:p>
      <text:p text:style-name="P25"><text:span text:style-name="T23">-</text:span><text:span text:style-name="T15">ACOLHIMENTO DE PACIENTE E ACOMPANHANTES, EXPLICO SOBRE O QUADRO CLÍNICO E TERAPÊUTICA INICIAL</text:span></text:p>
      <text:p text:style-name="P25"><text:span text:style-name="T15"/></text:p>
      <text:p text:style-name="P26"><text:span text:style-name="T24"># </text:span><text:span text:style-name="T25">METAS TERAPÊUTICA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4T19:27:29.863000000</meta:creation-date>
    <dc:date>2026-03-03T20:51:50.510000000</dc:date>
    <meta:editing-duration>PT55M3S</meta:editing-duration>
    <meta:editing-cycles>10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36" meta:word-count="176" meta:character-count="1177" meta:non-whitespace-character-count="1014"/>
  </office:meta>
</office:document-meta>
</file>